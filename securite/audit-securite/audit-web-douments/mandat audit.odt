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Text_20_body" style:list-style-name="L9">
      <style:paragraph-properties fo:margin-top="0cm" fo:margin-bottom="0cm"/>
    </style:style>
    <style:style style:name="P20" style:family="paragraph" style:parent-style-name="Text_20_body" style:list-style-name="L10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DAT D'AUTORISATION D'AUDIT DE SITE INTERNET</text:h>
      <text:h text:style-name="Heading_20_2" text:outline-level="2">Entre les soussignés</text:h>
      <text:h text:style-name="Heading_20_3" text:outline-level="3">Le Mandant</text:h>
      <text:p text:style-name="Text_20_body">Nom / Société : ______________________________________</text:p>
      <text:p text:style-name="Text_20_body">Représentant : ______________________________________</text:p>
      <text:p text:style-name="Text_20_body">Adresse : ____________________________________________</text:p>
      <text:p text:style-name="Text_20_body">SIRET : ______________________________________________</text:p>
      <text:p text:style-name="Text_20_body">Téléphone : __________________________________________</text:p>
      <text:p text:style-name="Text_20_body">E-mail : _____________________________________________</text:p>
      <text:p text:style-name="Text_20_body">Ci-après désigné « le Mandant »,</text:p>
      <text:p text:style-name="Text_20_body"><text:span text:style-name="Strong_20_Emphasis">Et</text:span></text:p>
      <text:h text:style-name="Heading_20_3" text:outline-level="3">Le Mandataire</text:h>
      <text:p text:style-name="Text_20_body">Nom / Société : ______________________________________</text:p>
      <text:p text:style-name="Text_20_body">Représentant : ______________________________________</text:p>
      <text:p text:style-name="Text_20_body">Adresse : ____________________________________________</text:p>
      <text:p text:style-name="Text_20_body">SIRET : ______________________________________________</text:p>
      <text:p text:style-name="Text_20_body">Téléphone : __________________________________________</text:p>
      <text:p text:style-name="Text_20_body">E-mail : _____________________________________________</text:p>
      <text:p text:style-name="Text_20_body">Ci-après désigné « le Mandataire ».</text:p>
      <text:p text:style-name="Horizontal_20_Line"/>
      <text:h text:style-name="Heading_20_1" text:outline-level="1">Article 1 – Objet du mandat</text:h>
      <text:p text:style-name="Text_20_body">Le Mandant autorise expressément le Mandataire à réaliser un audit du site internet suivant :</text:p>
      <text:p text:style-name="Text_20_body"><text:span text:style-name="Strong_20_Emphasis">Nom du site :</text:span> ____________________________________</text:p>
      <text:p text:style-name="Text_20_body"><text:span text:style-name="Strong_20_Emphasis">URL :</text:span> ___________________________________________</text:p>
      <text:p text:style-name="Text_20_body">L'audit a pour objectif d'évaluer notamment :</text:p>
      <text:list xml:id="list4361229196951469687" text:style-name="L1">
        <text:list-item>
          <text:p text:style-name="P11">la qualité technique du site ; </text:p>
        </text:list-item>
        <text:list-item>
          <text:p text:style-name="P11">les performances ; </text:p>
        </text:list-item>
        <text:list-item>
          <text:p text:style-name="P11">le référencement naturel (SEO) ; </text:p>
        </text:list-item>
        <text:list-item>
          <text:p text:style-name="P11">l'accessibilité ; </text:p>
        </text:list-item>
        <text:list-item>
          <text:p text:style-name="P11">les bonnes pratiques de développement ; </text:p>
        </text:list-item>
        <text:list-item>
          <text:p text:style-name="P11">la qualité de l'expérience utilisateur (UX) ; </text:p>
        </text:list-item>
        <text:list-item>
          <text:p text:style-name="P11"><text:soft-page-break/>les aspects de sécurité accessibles depuis l'extérieur du site ; </text:p>
        </text:list-item>
        <text:list-item>
          <text:p text:style-name="P1">la conformité réglementaire (RGPD, mentions légales, cookies, etc.). </text:p>
        </text:list-item>
      </text:list>
      <text:p text:style-name="Horizontal_20_Line"/>
      <text:h text:style-name="Heading_20_1" text:outline-level="1">Article 2 – Autorisation d'intervention</text:h>
      <text:p text:style-name="Text_20_body">Le Mandant autorise le Mandataire à effectuer :</text:p>
      <text:list xml:id="list6360031335512297434" text:style-name="L2">
        <text:list-item>
          <text:p text:style-name="P12">des analyses automatiques ; </text:p>
        </text:list-item>
        <text:list-item>
          <text:p text:style-name="P12">des analyses manuelles ; </text:p>
        </text:list-item>
        <text:list-item>
          <text:p text:style-name="P12">des scans de sécurité non intrusifs ; </text:p>
        </text:list-item>
        <text:list-item>
          <text:p text:style-name="P12">des vérifications de configuration ; </text:p>
        </text:list-item>
        <text:list-item>
          <text:p text:style-name="P12">des tests de conformité ; </text:p>
        </text:list-item>
        <text:list-item>
          <text:p text:style-name="P12">des analyses des technologies utilisées ; </text:p>
        </text:list-item>
        <text:list-item>
          <text:p text:style-name="P2">des contrôles des performances. </text:p>
        </text:list-item>
      </text:list>
      <text:p text:style-name="Text_20_body">Les opérations réalisées ne devront entraîner :</text:p>
      <text:list xml:id="list2945038552725906147" text:style-name="L3">
        <text:list-item>
          <text:p text:style-name="P13">aucune modification du site ; </text:p>
        </text:list-item>
        <text:list-item>
          <text:p text:style-name="P13">aucune altération des données ; </text:p>
        </text:list-item>
        <text:list-item>
          <text:p text:style-name="P13">aucune suppression de contenu ; </text:p>
        </text:list-item>
        <text:list-item>
          <text:p text:style-name="P3">aucune interruption volontaire du service. </text:p>
        </text:list-item>
      </text:list>
      <text:p text:style-name="Text_20_body">Le Mandataire s'interdit notamment :</text:p>
      <text:list xml:id="list184008749327453684" text:style-name="L4">
        <text:list-item>
          <text:p text:style-name="P14">toute tentative d'exploitation d'une vulnérabilité ; </text:p>
        </text:list-item>
        <text:list-item>
          <text:p text:style-name="P14">toute élévation de privilège ; </text:p>
        </text:list-item>
        <text:list-item>
          <text:p text:style-name="P14">toute extraction de données confidentielles ; </text:p>
        </text:list-item>
        <text:list-item>
          <text:p text:style-name="P14">toute attaque de type déni de service (DoS/DDoS) ; </text:p>
        </text:list-item>
        <text:list-item>
          <text:p text:style-name="P4">tout test susceptible de dégrader les performances du site. </text:p>
        </text:list-item>
      </text:list>
      <text:p text:style-name="Horizontal_20_Line"/>
      <text:h text:style-name="Heading_20_1" text:outline-level="1">Article 3 – Accès</text:h>
      <text:p text:style-name="Text_20_body">Lorsque cela est nécessaire, le Mandant pourra fournir :</text:p>
      <text:list xml:id="list459547356884750193" text:style-name="L5">
        <text:list-item>
          <text:p text:style-name="P15">un accès administrateur ; </text:p>
        </text:list-item>
        <text:list-item>
          <text:p text:style-name="P15">un accès FTP/SFTP ; </text:p>
        </text:list-item>
        <text:list-item>
          <text:p text:style-name="P15">un accès à l'hébergement ; </text:p>
        </text:list-item>
        <text:list-item>
          <text:p text:style-name="P15">un accès à Google Search Console ; </text:p>
        </text:list-item>
        <text:list-item>
          <text:p text:style-name="P15">un accès à Google Analytics ou Matomo ; </text:p>
        </text:list-item>
        <text:list-item>
          <text:p text:style-name="P5">tout autre accès utile. </text:p>
        </text:list-item>
      </text:list>
      <text:p text:style-name="Text_20_body">Le Mandataire s'engage à utiliser ces accès uniquement pendant la durée de la mission.</text:p>
      <text:p text:style-name="Horizontal_20_Line"/>
      <text:h text:style-name="Heading_20_1" text:outline-level="1">Article 4 – Confidentialité</text:h>
      <text:p text:style-name="Text_20_body">Toutes les informations obtenues pendant l'audit sont confidentielles.</text:p>
      <text:p text:style-name="Text_20_body">Le Mandataire s'engage à :</text:p>
      <text:list xml:id="list5462189082224650219" text:style-name="L6">
        <text:list-item>
          <text:p text:style-name="P16"><text:soft-page-break/>ne divulguer aucune information à un tiers ; </text:p>
        </text:list-item>
        <text:list-item>
          <text:p text:style-name="P16">ne conserver aucune copie des accès après la mission ; </text:p>
        </text:list-item>
        <text:list-item>
          <text:p text:style-name="P6">protéger les données qui lui sont confiées. </text:p>
        </text:list-item>
      </text:list>
      <text:p text:style-name="Text_20_body">Cette obligation demeure après la fin du contrat.</text:p>
      <text:p text:style-name="Horizontal_20_Line"/>
      <text:h text:style-name="Heading_20_1" text:outline-level="1">Article 5 – Rapport d'audit</text:h>
      <text:p text:style-name="Text_20_body">À l'issue de la mission, le Mandataire remettra un rapport pouvant contenir :</text:p>
      <text:list xml:id="list1248678263986725595" text:style-name="L7">
        <text:list-item>
          <text:p text:style-name="P17">les points de conformité ; </text:p>
        </text:list-item>
        <text:list-item>
          <text:p text:style-name="P17">les anomalies détectées ; </text:p>
        </text:list-item>
        <text:list-item>
          <text:p text:style-name="P17">les vulnérabilités mineures observées ; </text:p>
        </text:list-item>
        <text:list-item>
          <text:p text:style-name="P17">les recommandations d'amélioration ; </text:p>
        </text:list-item>
        <text:list-item>
          <text:p text:style-name="P7">une priorisation des actions correctives. </text:p>
        </text:list-item>
      </text:list>
      <text:p text:style-name="Text_20_body">Le rapport constitue une aide à la décision et ne garantit pas l'absence de vulnérabilités non détectées.</text:p>
      <text:p text:style-name="Horizontal_20_Line"/>
      <text:h text:style-name="Heading_20_1" text:outline-level="1">Article 6 – Limitation de responsabilité</text:h>
      <text:p text:style-name="Text_20_body">Le Mandataire est tenu à une obligation de moyens.</text:p>
      <text:p text:style-name="Text_20_body">Il ne peut être tenu responsable :</text:p>
      <text:list xml:id="list4478827839393762755" text:style-name="L8">
        <text:list-item>
          <text:p text:style-name="P18">des vulnérabilités non détectées ; </text:p>
        </text:list-item>
        <text:list-item>
          <text:p text:style-name="P18">des incidents préexistants ; </text:p>
        </text:list-item>
        <text:list-item>
          <text:p text:style-name="P18">des conséquences résultant de la non-application des recommandations ; </text:p>
        </text:list-item>
        <text:list-item>
          <text:p text:style-name="P8">des dommages liés à des interventions réalisées par des tiers. </text:p>
        </text:list-item>
      </text:list>
      <text:p text:style-name="Horizontal_20_Line"/>
      <text:h text:style-name="Heading_20_1" text:outline-level="1">Article 7 – Durée</text:h>
      <text:p text:style-name="Text_20_body">Le présent mandat prend effet à compter de sa signature.</text:p>
      <text:p text:style-name="Text_20_body">Il prend fin :</text:p>
      <text:list xml:id="list5450561251135981170" text:style-name="L9">
        <text:list-item>
          <text:p text:style-name="P19">à la remise du rapport d'audit ; </text:p>
        </text:list-item>
        <text:list-item>
          <text:p text:style-name="P9">ou au plus tard le ____ / ____ / ______. </text:p>
        </text:list-item>
      </text:list>
      <text:p text:style-name="Horizontal_20_Line"/>
      <text:h text:style-name="Heading_20_1" text:outline-level="1">Article 8 – Protection des données</text:h>
      <text:p text:style-name="Text_20_body">Le Mandataire s'engage à respecter la réglementation applicable en matière de protection des données personnelles, notamment le RGPD.</text:p>
      <text:p text:style-name="Text_20_body">Les données éventuellement consultées ne seront utilisées que dans le cadre de la présente mission.</text:p>
      <text:p text:style-name="Horizontal_20_Line"/>
      <text:h text:style-name="Heading_20_1" text:outline-level="1"><text:soft-page-break/>Article 9 – Restitution des accès</text:h>
      <text:p text:style-name="Text_20_body">À la fin de la mission, le Mandataire :</text:p>
      <text:list xml:id="list334841246019684555" text:style-name="L10">
        <text:list-item>
          <text:p text:style-name="P20">supprimera les identifiants communiqués ; </text:p>
        </text:list-item>
        <text:list-item>
          <text:p text:style-name="P20">restituera les documents fournis ; </text:p>
        </text:list-item>
        <text:list-item>
          <text:p text:style-name="P10">détruira les copies de travail contenant des informations confidentielles, sauf obligation légale contraire. </text:p>
        </text:list-item>
      </text:list>
      <text:p text:style-name="Horizontal_20_Line"/>
      <text:h text:style-name="Heading_20_1" text:outline-level="1">Article 10 – Droit applicable</text:h>
      <text:p text:style-name="Text_20_body">Le présent mandat est soumis au droit français.</text:p>
      <text:p text:style-name="Text_20_body">Tout différend sera soumis aux tribunaux compétents du ressort du siège social du Mandant, sauf disposition légale impérative contraire.</text:p>
      <text:p text:style-name="Horizontal_20_Line"/>
      <text:h text:style-name="Heading_20_1" text:outline-level="1">Signatures</text:h>
      <text:h text:style-name="Heading_20_3" text:outline-level="3">Le Mandant</text:h>
      <text:p text:style-name="Text_20_body">Nom :</text:p>
      <text:p text:style-name="Text_20_body">Fonction :</text:p>
      <text:p text:style-name="Text_20_body">Date :</text:p>
      <text:p text:style-name="Text_20_body">Signature précédée de la mention :</text:p>
      <text:p text:style-name="Text_20_body"><text:span text:style-name="Strong_20_Emphasis">« Bon pour autorisation d'audit du site internet »</text:span></text:p>
      <text:p text:style-name="Horizontal_20_Line"/>
      <text:h text:style-name="Heading_20_3" text:outline-level="3">Le Mandataire</text:h>
      <text:p text:style-name="Text_20_body">Nom :</text:p>
      <text:p text:style-name="Text_20_body">Fonction :</text:p>
      <text:p text:style-name="Text_20_body">Date :</text:p>
      <text:p text:style-name="Text_20_body">Signature précédée de la mention :</text:p>
      <text:p text:style-name="Text_20_body"><text:span text:style-name="Strong_20_Emphasis">« Bon pour acceptation de la mission »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5$Win32 OpenOffice.org_project/4115m2$Build-9813</meta:generator>
    <dc:date>2026-06-29T17:20:41.37</dc:date>
    <meta:document-statistic meta:table-count="0" meta:image-count="0" meta:object-count="0" meta:page-count="4" meta:paragraph-count="112" meta:word-count="718" meta:character-count="4689"/>
    <dc:creator>marcos manzanares</dc:creator>
    <meta:user-defined meta:name="Info 1"/>
    <meta:user-defined meta:name="Info 2"/>
    <meta:user-defined meta:name="Info 3"/>
    <meta:user-defined meta:name="Info 4"/>
  </office:meta>
</office:document-meta>
</file>