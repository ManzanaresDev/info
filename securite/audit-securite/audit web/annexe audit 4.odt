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723cm" table:align="left"/>
    </style:style>
    <style:style style:name="Tableau1.A" style:family="table-column">
      <style:table-column-properties style:column-width="0.69cm"/>
    </style:style>
    <style:style style:name="Tableau1.B" style:family="table-column">
      <style:table-column-properties style:column-width="2.358cm"/>
    </style:style>
    <style:style style:name="Tableau1.C" style:family="table-column">
      <style:table-column-properties style:column-width="1.697cm"/>
    </style:style>
    <style:style style:name="Tableau1.D" style:family="table-column">
      <style:table-column-properties style:column-width="4.97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6"/>
    <style:style style:name="P2" style:family="paragraph" style:parent-style-name="Text_20_body" style:list-style-name="L6">
      <style:paragraph-properties fo:margin-top="0cm" fo:margin-bottom="0cm"/>
    </style:style>
    <style:style style:name="P3" style:family="paragraph" style:parent-style-name="Horizontal_20_Line" style:list-style-name="L1"/>
    <style:style style:name="P4" style:family="paragraph" style:parent-style-name="Horizontal_20_Line" style:list-style-name="L2"/>
    <style:style style:name="P5" style:family="paragraph" style:parent-style-name="Horizontal_20_Line" style:list-style-name="L3"/>
    <style:style style:name="P6" style:family="paragraph" style:parent-style-name="Horizontal_20_Line" style:list-style-name="L4"/>
    <style:style style:name="P7" style:family="paragraph" style:parent-style-name="Horizontal_20_Line" style:list-style-name="L5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NEXE N°4</text:h>
      <text:h text:style-name="Heading_20_1" text:outline-level="1">Modèle de rapport d'audit</text:h>
      <text:p text:style-name="Horizontal_20_Line"/>
      <text:h text:style-name="Heading_20_1" text:outline-level="1">RAPPORT D'AUDIT</text:h>
      <text:p text:style-name="Text_20_body"><text:span text:style-name="Strong_20_Emphasis">Client :</text:span> __________________________</text:p>
      <text:p text:style-name="Text_20_body"><text:span text:style-name="Strong_20_Emphasis">Site :</text:span> ____________________________</text:p>
      <text:p text:style-name="Text_20_body"><text:span text:style-name="Strong_20_Emphasis">URL :</text:span> ____________________________</text:p>
      <text:p text:style-name="Text_20_body"><text:span text:style-name="Strong_20_Emphasis">Date de l'audit :</text:span> __________________</text:p>
      <text:p text:style-name="Text_20_body"><text:span text:style-name="Strong_20_Emphasis">Auditeur :</text:span> ________________________</text:p>
      <text:p text:style-name="Horizontal_20_Line"/>
      <text:h text:style-name="Heading_20_1" text:outline-level="1">1. Résumé exécutif</text:h>
      <text:h text:style-name="Heading_20_2" text:outline-level="2">État général</text:h>
      <text:p text:style-name="Text_20_body">☐ Excellent</text:p>
      <text:p text:style-name="Text_20_body">☐ Bon</text:p>
      <text:p text:style-name="Text_20_body">☐ Moyen</text:p>
      <text:p text:style-name="Text_20_body">☐ À améliorer</text:p>
      <text:p text:style-name="Horizontal_20_Line"/>
      <text:h text:style-name="Heading_20_2" text:outline-level="2">Score global</text:h>
      <text:p text:style-name="Text_20_body">Performance : ____ /100</text:p>
      <text:p text:style-name="Text_20_body">SEO : ____ /100</text:p>
      <text:p text:style-name="Text_20_body">Accessibilité : ____ /100</text:p>
      <text:p text:style-name="Text_20_body">Bonnes pratiques : ____ /100</text:p>
      <text:p text:style-name="Text_20_body">Sécurité (non intrusive) : ____ /100</text:p>
      <text:p text:style-name="Horizontal_20_Line"/>
      <text:h text:style-name="Heading_20_1" text:outline-level="1">2. Synthèse</text:h>
      <text:h text:style-name="Heading_20_3" text:outline-level="3">Points forts</text:h>
      <text:list xml:id="list9033152593567911023" text:style-name="L1">
        <text:list-item>
          <text:p text:style-name="P3"/>
        </text:list-item>
        <text:list-item>
          <text:p text:style-name="P3"><text:soft-page-break/></text:p>
        </text:list-item>
        <text:list-item>
          <text:p text:style-name="P3"/>
        </text:list-item>
      </text:list>
      <text:h text:style-name="Heading_20_3" text:outline-level="3">Points à améliorer</text:h>
      <text:list xml:id="list164929910734760861" text:style-name="L2"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</text:list>
      <text:p text:style-name="Horizontal_20_Line"/>
      <text:h text:style-name="Heading_20_1" text:outline-level="1">3. Détail des constats</text:h>
      <text:h text:style-name="Heading_20_2" text:outline-level="2">Constat n°1</text:h>
      <text:p text:style-name="Text_20_body"><text:span text:style-name="Strong_20_Emphasis">Catégorie</text:span></text:p>
      <text:p text:style-name="Text_20_body">☐ Technique</text:p>
      <text:p text:style-name="Text_20_body">☐ SEO</text:p>
      <text:p text:style-name="Text_20_body">☐ Performance</text:p>
      <text:p text:style-name="Text_20_body">☐ Accessibilité</text:p>
      <text:p text:style-name="Text_20_body">☐ Sécurité</text:p>
      <text:p text:style-name="Horizontal_20_Line"/>
      <text:p text:style-name="Text_20_body"><text:span text:style-name="Strong_20_Emphasis">Description</text:span></text:p>
      <text:p text:style-name="Horizontal_20_Line"/>
      <text:p text:style-name="Horizontal_20_Line"/>
      <text:p text:style-name="Text_20_body"><text:span text:style-name="Strong_20_Emphasis">Impact</text:span></text:p>
      <text:p text:style-name="Horizontal_20_Line"/>
      <text:p text:style-name="Horizontal_20_Line"/>
      <text:p text:style-name="Text_20_body"><text:span text:style-name="Strong_20_Emphasis">Criticité</text:span></text:p>
      <text:p text:style-name="Text_20_body">☐ Faible</text:p>
      <text:p text:style-name="Text_20_body">☐ Moyen</text:p>
      <text:p text:style-name="Text_20_body">☐ Élevé</text:p>
      <text:p text:style-name="Text_20_body">☐ Critique</text:p>
      <text:p text:style-name="Horizontal_20_Line"/>
      <text:p text:style-name="Text_20_body"><text:span text:style-name="Strong_20_Emphasis">Recommandation</text:span></text:p>
      <text:p text:style-name="Horizontal_20_Line"/>
      <text:p text:style-name="Horizontal_20_Line"/>
      <text:p text:style-name="Text_20_body"><text:span text:style-name="Strong_20_Emphasis">Capture d'écran</text:span></text:p>
      <text:p text:style-name="Text_20_body"><text:soft-page-break/>(insérer si nécessaire)</text:p>
      <text:p text:style-name="Horizontal_20_Line"/>
      <text:p text:style-name="Text_20_body">(Reproduire cette fiche pour chaque anomalie.)</text:p>
      <text:p text:style-name="Horizontal_20_Line"/>
      <text:h text:style-name="Heading_20_1" text:outline-level="1">4. Tableau récapitulatif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N°</text:p>
            </table:table-cell>
            <table:table-cell table:style-name="Tableau1.A1" office:value-type="string">
              <text:p text:style-name="Table_20_Heading">Domaine</text:p>
            </table:table-cell>
            <table:table-cell table:style-name="Tableau1.A1" office:value-type="string">
              <text:p text:style-name="Table_20_Heading">Criticité</text:p>
            </table:table-cell>
            <table:table-cell table:style-name="Tableau1.A1" office:value-type="string">
              <text:p text:style-name="Table_20_Heading">Action recommandée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SEO</text:p>
          </table:table-cell>
          <table:table-cell table:style-name="Tableau1.A1" office:value-type="string">
            <text:p text:style-name="Table_20_Contents">Moyen</text:p>
          </table:table-cell>
          <table:table-cell table:style-name="Tableau1.A1" office:value-type="string">
            <text:p text:style-name="Table_20_Contents">Corriger les balises Title</text:p>
          </table:table-cell>
        </table:table-row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Performance</text:p>
          </table:table-cell>
          <table:table-cell table:style-name="Tableau1.A1" office:value-type="string">
            <text:p text:style-name="Table_20_Contents">Faible</text:p>
          </table:table-cell>
          <table:table-cell table:style-name="Tableau1.A1" office:value-type="string">
            <text:p text:style-name="Table_20_Contents">Optimiser les images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Sécurité</text:p>
          </table:table-cell>
          <table:table-cell table:style-name="Tableau1.A1" office:value-type="string">
            <text:p text:style-name="Table_20_Contents">Élevé</text:p>
          </table:table-cell>
          <table:table-cell table:style-name="Tableau1.A1" office:value-type="string">
            <text:p text:style-name="Table_20_Contents">Ajouter les en-têtes HTTP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Accessibilité</text:p>
          </table:table-cell>
          <table:table-cell table:style-name="Tableau1.A1" office:value-type="string">
            <text:p text:style-name="Table_20_Contents">Moyen</text:p>
          </table:table-cell>
          <table:table-cell table:style-name="Tableau1.A1" office:value-type="string">
            <text:p text:style-name="Table_20_Contents">Ajouter les textes alternatifs</text:p>
          </table:table-cell>
        </table:table-row>
      </table:table>
      <text:p text:style-name="Horizontal_20_Line"/>
      <text:h text:style-name="Heading_20_1" text:outline-level="1">5. Plan d'action recommandé</text:h>
      <text:h text:style-name="Heading_20_2" text:outline-level="2">Priorité 1</text:h>
      <text:p text:style-name="Text_20_body">Actions urgentes :</text:p>
      <text:list xml:id="list4317021418174784721" text:style-name="L3">
        <text:list-item>
          <text:p text:style-name="P5"/>
        </text:list-item>
        <text:list-item>
          <text:p text:style-name="P5"/>
        </text:list-item>
      </text:list>
      <text:p text:style-name="Horizontal_20_Line"/>
      <text:h text:style-name="Heading_20_2" text:outline-level="2">Priorité 2</text:h>
      <text:p text:style-name="Text_20_body">Actions à court terme :</text:p>
      <text:list xml:id="list3051919391044588849" text:style-name="L4">
        <text:list-item>
          <text:p text:style-name="P6"/>
        </text:list-item>
        <text:list-item>
          <text:p text:style-name="P6"/>
        </text:list-item>
      </text:list>
      <text:p text:style-name="Horizontal_20_Line"/>
      <text:h text:style-name="Heading_20_2" text:outline-level="2">Priorité 3</text:h>
      <text:p text:style-name="Text_20_body">Améliorations de confort :</text:p>
      <text:list xml:id="list990829733147438762" text:style-name="L5">
        <text:list-item>
          <text:p text:style-name="P7"/>
        </text:list-item>
        <text:list-item>
          <text:p text:style-name="P7"/>
        </text:list-item>
      </text:list>
      <text:p text:style-name="Horizontal_20_Line"/>
      <text:h text:style-name="Heading_20_1" text:outline-level="1">6. Conclusion</text:h>
      <text:p text:style-name="Text_20_body">Le présent rapport présente les constats réalisés dans le cadre d'un audit non intrusif. Les <text:soft-page-break/>recommandations formulées visent à améliorer les performances, la sécurité, la conformité et la qualité générale du site.</text:p>
      <text:p text:style-name="Text_20_body">Le rapport ne garantit pas l'absence de vulnérabilités ou d'anomalies non détectées et ne se substitue pas à un audit de sécurité approfondi ou à un test d'intrusion.</text:p>
      <text:p text:style-name="Horizontal_20_Line"/>
      <text:h text:style-name="Heading_20_1" text:outline-level="1">Signature</text:h>
      <text:p text:style-name="Text_20_body"><text:span text:style-name="Strong_20_Emphasis">Le Mandataire</text:span></text:p>
      <text:p text:style-name="Text_20_body">Nom :</text:p>
      <text:p text:style-name="Text_20_body">Date :</text:p>
      <text:p text:style-name="Text_20_body">Signature :</text:p>
      <text:p text:style-name="Horizontal_20_Line"/>
      <text:h text:style-name="Heading_20_2" text:outline-level="2">Une recommandation supplémentaire</text:h>
      <text:p text:style-name="Text_20_body">Si vous souhaitez proposer ces audits de manière professionnelle, je vous conseille de constituer un <text:span text:style-name="Strong_20_Emphasis">dossier complet</text:span> comprenant :</text:p>
      <text:list xml:id="list8441528812490407826" text:style-name="L6">
        <text:list-item>
          <text:p text:style-name="P2"><text:span text:style-name="Strong_20_Emphasis">Mandat d'autorisation d'audit</text:span> (2 à 3 pages) </text:p>
        </text:list-item>
        <text:list-item>
          <text:p text:style-name="P2"><text:span text:style-name="Strong_20_Emphasis">Annexe 1 – Périmètre de la mission</text:span> </text:p>
        </text:list-item>
        <text:list-item>
          <text:p text:style-name="P2"><text:span text:style-name="Strong_20_Emphasis">Annexe 2 – Outils utilisés</text:span> </text:p>
        </text:list-item>
        <text:list-item>
          <text:p text:style-name="P2"><text:span text:style-name="Strong_20_Emphasis">Annexe 3 – Méthode de cotation des anomalies</text:span> </text:p>
        </text:list-item>
        <text:list-item>
          <text:p text:style-name="P2"><text:span text:style-name="Strong_20_Emphasis">Annexe 4 – Rapport d'audit</text:span> </text:p>
        </text:list-item>
        <text:list-item>
          <text:p text:style-name="P2"><text:span text:style-name="Strong_20_Emphasis">Accord de confidentialité (NDA)</text:span> signé par les deux parties </text:p>
        </text:list-item>
        <text:list-item>
          <text:p text:style-name="P1"><text:span text:style-name="Strong_20_Emphasis">Conditions Générales de Prestation (CGP)</text:span> précisant les limites de responsabilité, les modalités de paiement, la propriété intellectuelle des livrables et les conditions de résiliati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5$Win32 OpenOffice.org_project/4115m2$Build-9813</meta:generator>
    <dc:date>2026-06-29T17:25:22.01</dc:date>
    <meta:document-statistic meta:table-count="1" meta:image-count="0" meta:object-count="0" meta:page-count="4" meta:paragraph-count="87" meta:word-count="333" meta:character-count="2102"/>
    <dc:creator>marcos manzanares</dc:creator>
    <meta:user-defined meta:name="Info 1"/>
    <meta:user-defined meta:name="Info 2"/>
    <meta:user-defined meta:name="Info 3"/>
    <meta:user-defined meta:name="Info 4"/>
  </office:meta>
</office:document-meta>
</file>