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2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NEXE N°1</text:h>
      <text:h text:style-name="Heading_20_2" text:outline-level="2">Périmètre de l'audit du site internet</text:h>
      <text:p text:style-name="Text_20_body"><text:span text:style-name="Strong_20_Emphasis">Mandat n° :</text:span> ______________________</text:p>
      <text:p text:style-name="Text_20_body"><text:span text:style-name="Strong_20_Emphasis">Date :</text:span> ____ / ____ / ______</text:p>
      <text:p text:style-name="Text_20_body"><text:span text:style-name="Strong_20_Emphasis">Client (Mandant) :</text:span> ______________________________________</text:p>
      <text:p text:style-name="Text_20_body"><text:span text:style-name="Strong_20_Emphasis">Auditeur (Mandataire) :</text:span> __________________________________</text:p>
      <text:p text:style-name="Text_20_body"><text:span text:style-name="Strong_20_Emphasis">Site concerné :</text:span> _________________________________________</text:p>
      <text:p text:style-name="Text_20_body"><text:span text:style-name="Strong_20_Emphasis">URL :</text:span> _________________________________________________</text:p>
      <text:p text:style-name="Horizontal_20_Line"/>
      <text:h text:style-name="Heading_20_1" text:outline-level="1">1. Objet</text:h>
      <text:p text:style-name="Text_20_body">La présente annexe définit le périmètre des contrôles autorisés dans le cadre de la mission d'audit.</text:p>
      <text:p text:style-name="Text_20_body">L'ensemble des vérifications sera réalisé de manière <text:span text:style-name="Strong_20_Emphasis">non intrusive</text:span>, sans modification des données ni interruption volontaire du service.</text:p>
      <text:p text:style-name="Horizontal_20_Line"/>
      <text:h text:style-name="Heading_20_1" text:outline-level="1">2. Contrôles autorisés</text:h>
      <text:p text:style-name="Text_20_body">Le Mandataire est autorisé à réaliser les contrôles suivants.</text:p>
      <text:h text:style-name="Heading_20_2" text:outline-level="2">A. Audit technique</text:h>
      <text:p text:style-name="Text_20_body">☐ Analyse de la structure du site</text:p>
      <text:p text:style-name="Text_20_body">☐ Analyse HTML / CSS / JavaScript</text:p>
      <text:p text:style-name="Text_20_body">☐ Vérification des erreurs techniques</text:p>
      <text:p text:style-name="Text_20_body">☐ Contrôle des redirections</text:p>
      <text:p text:style-name="Text_20_body">☐ Vérification des liens cassés</text:p>
      <text:p text:style-name="Text_20_body">☐ Analyse des en-têtes HTTP</text:p>
      <text:p text:style-name="Text_20_body">☐ Analyse de l'architecture du site</text:p>
      <text:p text:style-name="Text_20_body">☐ Analyse des technologies utilisées</text:p>
      <text:p text:style-name="Horizontal_20_Line"/>
      <text:h text:style-name="Heading_20_2" text:outline-level="2">B. Performances</text:h>
      <text:p text:style-name="Text_20_body">☐ Temps de chargement</text:p>
      <text:p text:style-name="Text_20_body">☐ Optimisation des images</text:p>
      <text:p text:style-name="Text_20_body">☐ Compression des ressources</text:p>
      <text:p text:style-name="Text_20_body"><text:soft-page-break/>☐ Mise en cache</text:p>
      <text:p text:style-name="Text_20_body">☐ Analyse Core Web Vitals</text:p>
      <text:p text:style-name="Text_20_body">☐ Analyse mobile</text:p>
      <text:p text:style-name="Text_20_body">☐ Analyse desktop</text:p>
      <text:p text:style-name="Horizontal_20_Line"/>
      <text:h text:style-name="Heading_20_2" text:outline-level="2">C. Référencement (SEO)</text:h>
      <text:p text:style-name="Text_20_body">☐ Balises Title</text:p>
      <text:p text:style-name="Text_20_body">☐ Meta Description</text:p>
      <text:p text:style-name="Text_20_body">☐ Balises Hn</text:p>
      <text:p text:style-name="Text_20_body">☐ Sitemap XML</text:p>
      <text:p text:style-name="Text_20_body">☐ Robots.txt</text:p>
      <text:p text:style-name="Text_20_body">☐ Maillage interne</text:p>
      <text:p text:style-name="Text_20_body">☐ Liens externes</text:p>
      <text:p text:style-name="Text_20_body">☐ Indexabilité</text:p>
      <text:p text:style-name="Text_20_body">☐ Données structurées</text:p>
      <text:p text:style-name="Text_20_body">☐ Canonical</text:p>
      <text:p text:style-name="Horizontal_20_Line"/>
      <text:h text:style-name="Heading_20_2" text:outline-level="2">D. Accessibilité</text:h>
      <text:p text:style-name="Text_20_body">☐ Contrôle des contrastes</text:p>
      <text:p text:style-name="Text_20_body">☐ Présence des attributs ALT</text:p>
      <text:p text:style-name="Text_20_body">☐ Navigation clavier</text:p>
      <text:p text:style-name="Text_20_body">☐ Structure des titres</text:p>
      <text:p text:style-name="Text_20_body">☐ Vérification selon les recommandations WCAG</text:p>
      <text:p text:style-name="Horizontal_20_Line"/>
      <text:h text:style-name="Heading_20_2" text:outline-level="2">E. Sécurité (non intrusive)</text:h>
      <text:p text:style-name="Text_20_body">Le Mandataire est autorisé à effectuer uniquement des vérifications passives.</text:p>
      <text:p text:style-name="Text_20_body">Peuvent notamment être réalisés :</text:p>
      <text:p text:style-name="Text_20_body">☐ Vérification du certificat SSL/TLS</text:p>
      <text:p text:style-name="Text_20_body">☐ Vérification des versions de protocoles</text:p>
      <text:p text:style-name="Text_20_body">☐ Contrôle des en-têtes de sécurité</text:p>
      <text:p text:style-name="Text_20_body">☐ Analyse des cookies</text:p>
      <text:p text:style-name="Text_20_body">☐ Recherche d'informations publiques</text:p>
      <text:p text:style-name="Text_20_body">☐ Détection de technologies obsolètes</text:p>
      <text:p text:style-name="Text_20_body"><text:soft-page-break/>☐ Vérification de la configuration HTTP</text:p>
      <text:p text:style-name="Text_20_body">☐ Vérification des pages d'administration accessibles publiquement</text:p>
      <text:p text:style-name="Text_20_body">☐ Détection d'informations sensibles exposées</text:p>
      <text:p text:style-name="Text_20_body">☐ Vérification des politiques CSP, HSTS, X-Frame-Options, etc.</text:p>
      <text:p text:style-name="Horizontal_20_Line"/>
      <text:h text:style-name="Heading_20_1" text:outline-level="1">3. Vérifications explicitement exclues</text:h>
      <text:p text:style-name="Text_20_body">Le présent mandat <text:span text:style-name="Strong_20_Emphasis">n'autorise pas</text:span> :</text:p>
      <text:p text:style-name="Text_20_body">☒ Pentest</text:p>
      <text:p text:style-name="Text_20_body">☒ Exploitation de vulnérabilités</text:p>
      <text:p text:style-name="Text_20_body">☒ Injection SQL</text:p>
      <text:p text:style-name="Text_20_body">☒ Tests XSS actifs</text:p>
      <text:p text:style-name="Text_20_body">☒ Brute force</text:p>
      <text:p text:style-name="Text_20_body">☒ Attaque par dictionnaire</text:p>
      <text:p text:style-name="Text_20_body">☒ Déni de service (DoS)</text:p>
      <text:p text:style-name="Text_20_body">☒ Déni de service distribué (DDoS)</text:p>
      <text:p text:style-name="Text_20_body">☒ Scan agressif</text:p>
      <text:p text:style-name="Text_20_body">☒ Escalade de privilèges</text:p>
      <text:p text:style-name="Text_20_body">☒ Contournement d'authentification</text:p>
      <text:p text:style-name="Text_20_body">☒ Extraction de données</text:p>
      <text:p text:style-name="Text_20_body">☒ Modification de fichiers</text:p>
      <text:p text:style-name="Text_20_body">☒ Suppression de données</text:p>
      <text:p text:style-name="Text_20_body">☒ Téléversement de fichiers</text:p>
      <text:p text:style-name="Text_20_body">☒ Exécution de code</text:p>
      <text:p text:style-name="Text_20_body">☒ Toute action susceptible d'altérer le fonctionnement du site</text:p>
      <text:p text:style-name="Horizontal_20_Line"/>
      <text:h text:style-name="Heading_20_1" text:outline-level="1">4. Outils susceptibles d'être utilisés</text:h>
      <text:p text:style-name="Text_20_body">Selon les besoins de l'audit, le Mandataire pourra utiliser notamment :</text:p>
      <text:list xml:id="list4576051663925189826" text:style-name="L1">
        <text:list-item>
          <text:p text:style-name="P3">Google Lighthouse </text:p>
        </text:list-item>
        <text:list-item>
          <text:p text:style-name="P3">PageSpeed Insights </text:p>
        </text:list-item>
        <text:list-item>
          <text:p text:style-name="P3">GTmetrix </text:p>
        </text:list-item>
        <text:list-item>
          <text:p text:style-name="P3">WAVE Accessibility </text:p>
        </text:list-item>
        <text:list-item>
          <text:p text:style-name="P3">Google Search Console </text:p>
        </text:list-item>
        <text:list-item>
          <text:p text:style-name="P3">Google Analytics (si un accès est fourni) </text:p>
        </text:list-item>
        <text:list-item>
          <text:p text:style-name="P3">SecurityHeaders.com </text:p>
        </text:list-item>
        <text:list-item>
          <text:p text:style-name="P3">Mozilla Observatory </text:p>
        </text:list-item>
        <text:list-item>
          <text:p text:style-name="P3">SSL Labs </text:p>
        </text:list-item>
        <text:list-item>
          <text:p text:style-name="P3"><text:soft-page-break/>Screaming Frog SEO Spider </text:p>
        </text:list-item>
        <text:list-item>
          <text:p text:style-name="P3">Ahrefs / Semrush (si disponibles) </text:p>
        </text:list-item>
        <text:list-item>
          <text:p text:style-name="P3">WebPageTest </text:p>
        </text:list-item>
        <text:list-item>
          <text:p text:style-name="P3">BuiltWith </text:p>
        </text:list-item>
        <text:list-item>
          <text:p text:style-name="P3">Wappalyzer </text:p>
        </text:list-item>
        <text:list-item>
          <text:p text:style-name="P1">Autres outils professionnels équivalents. </text:p>
        </text:list-item>
      </text:list>
      <text:p text:style-name="Horizontal_20_Line"/>
      <text:h text:style-name="Heading_20_1" text:outline-level="1">5. Livrables</text:h>
      <text:p text:style-name="Text_20_body">Le rapport pourra comprendre :</text:p>
      <text:list xml:id="list2592560810278851811" text:style-name="L2">
        <text:list-item>
          <text:p text:style-name="P4">une synthèse générale ; </text:p>
        </text:list-item>
        <text:list-item>
          <text:p text:style-name="P4">les constats détaillés ; </text:p>
        </text:list-item>
        <text:list-item>
          <text:p text:style-name="P4">le niveau de criticité (Faible / Moyen / Élevé) ; </text:p>
        </text:list-item>
        <text:list-item>
          <text:p text:style-name="P4">des captures d'écran, si nécessaire ; </text:p>
        </text:list-item>
        <text:list-item>
          <text:p text:style-name="P4">des recommandations d'amélioration ; </text:p>
        </text:list-item>
        <text:list-item>
          <text:p text:style-name="P2">une estimation de la priorité des corrections. </text:p>
        </text:list-item>
      </text:list>
      <text:p text:style-name="Horizontal_20_Line"/>
      <text:h text:style-name="Heading_20_1" text:outline-level="1">6. Durée de validité</text:h>
      <text:p text:style-name="Text_20_body">La présente annexe est valable uniquement pour la mission d'audit mentionnée dans le mandat.</text:p>
      <text:p text:style-name="Text_20_body">Toute intervention dépassant le périmètre défini devra faire l'objet d'une autorisation écrite complémentaire.</text:p>
      <text:p text:style-name="Horizontal_20_Line"/>
      <text:h text:style-name="Heading_20_1" text:outline-level="1">Validation</text:h>
      <text:h text:style-name="Heading_20_3" text:outline-level="3">Le Mandant</text:h>
      <text:p text:style-name="Text_20_body">Nom :</text:p>
      <text:p text:style-name="Text_20_body">Fonction :</text:p>
      <text:p text:style-name="Text_20_body">Date :</text:p>
      <text:p text:style-name="Text_20_body">Signature</text:p>
      <text:p text:style-name="Horizontal_20_Line"/>
      <text:h text:style-name="Heading_20_3" text:outline-level="3">Le Mandataire</text:h>
      <text:p text:style-name="Text_20_body">Nom :</text:p>
      <text:p text:style-name="Text_20_body">Fonction :</text:p>
      <text:p text:style-name="Text_20_body">Date :</text:p>
      <text:p text:style-name="Text_20_body">Signature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15$Win32 OpenOffice.org_project/4115m2$Build-9813</meta:generator>
    <dc:date>2026-06-29T17:22:53.57</dc:date>
    <meta:document-statistic meta:table-count="0" meta:image-count="0" meta:object-count="0" meta:page-count="5" meta:paragraph-count="118" meta:word-count="534" meta:character-count="3501"/>
    <dc:creator>marcos manzanares</dc:creator>
    <meta:user-defined meta:name="Info 1"/>
    <meta:user-defined meta:name="Info 2"/>
    <meta:user-defined meta:name="Info 3"/>
    <meta:user-defined meta:name="Info 4"/>
  </office:meta>
</office:document-meta>
</file>